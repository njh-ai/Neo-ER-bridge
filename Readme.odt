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========================================================================</text:p>
      <text:p text:style-name="Preformatted_20_Text">TECHNICAL AND ALGORITHMIC EXPLANATION: NEO ER BRIDGE SOFTWARE MECHANICS</text:p>
      <text:p text:style-name="Preformatted_20_Text">========================================================================</text:p>
      <text:p text:style-name="Preformatted_20_Text">Project Name: <text:s/>Neo ER Bridge</text:p>
      <text:p text:style-name="Preformatted_20_Text">Developer: <text:s text:c="4"/>Nicholas Hope</text:p>
      <text:p text:style-name="Preformatted_20_Text">License: <text:s text:c="6"/>GNU General Public License v3 (GPLv3)</text:p>
      <text:p text:style-name="Preformatted_20_Text">Language: <text:s text:c="5"/>C++ (Modern C++11/14/17 standard compatible)</text:p>
      <text:p text:style-name="Preformatted_20_Text">File Split: <text:s text:c="3"/>Decompiled into 'neo_er_bridge.hpp' &amp; 'neo_er_bridge.cpp'</text:p>
      <text:p text:style-name="Preformatted_20_Text"/>
      <text:p text:style-name="Preformatted_20_Text">This document provides a comprehensive, deep-dive explanation of exactly </text:p>
      <text:p text:style-name="Preformatted_20_Text">what the C++ source code is doing, the algorithmic and architectural design </text:p>
      <text:p text:style-name="Preformatted_20_Text">patterns used, and how data flows through the system.</text:p>
      <text:p text:style-name="Preformatted_20_Text"/>
      <text:p text:style-name="Preformatted_20_Text">------------------------------------------------------------------------</text:p>
      <text:p text:style-name="Preformatted_20_Text">1. HIGH-LEVEL SYSTEM PURPOSE</text:p>
      <text:p text:style-name="Preformatted_20_Text">------------------------------------------------------------------------</text:p>
      <text:p text:style-name="Preformatted_20_Text">The Neo ER Bridge is a highly optimized, modular system designed to simulate </text:p>
      <text:p text:style-name="Preformatted_20_Text">and manage data distribution across a multi-dimensional state space. </text:p>
      <text:p text:style-name="Preformatted_20_Text">Architecturally, it functions as a thread-safe computational pipeline </text:p>
      <text:p text:style-name="Preformatted_20_Text">that takes an input balance (or pressure/load metrics), safely routes a </text:p>
      <text:p text:style-name="Preformatted_20_Text">controlled percentage of that load to a "virtual partner" across a </text:p>
      <text:p text:style-name="Preformatted_20_Text">conceptual bridge link, and then analytically verifies the mathematical </text:p>
      <text:p text:style-name="Preformatted_20_Text">integrity and coherence of the system to prevent calculation errors.</text:p>
      <text:p text:style-name="Preformatted_20_Text"/>
      <text:p text:style-name="Preformatted_20_Text">------------------------------------------------------------------------</text:p>
      <text:p text:style-name="Preformatted_20_Text">2. CORE DATA TYPES &amp; MEMORY ARCHITECTURE</text:p>
      <text:p text:style-name="Preformatted_20_Text">------------------------------------------------------------------------</text:p>
      <text:p text:style-name="Preformatted_20_Text">To understand what the functions do, we must first look at the memory footprints </text:p>
      <text:p text:style-name="Preformatted_20_Text">defined in the `neo` namespace:</text:p>
      <text:p text:style-name="Preformatted_20_Text"/>
      <text:p text:style-name="Preformatted_20_Text"><text:s text:c="2"/>* `Complex` (std::complex&lt;double&gt;):</text:p>
      <text:p text:style-name="Preformatted_20_Text"><text:s text:c="4"/>Represents numbers containing both a real part and an imaginary part. </text:p>
      <text:p text:style-name="Preformatted_20_Text"><text:s text:c="4"/>This allows the software to track phase and amplitude rather than </text:p>
      <text:p text:style-name="Preformatted_20_Text"><text:s text:c="4"/>just flat, scalar numbers.</text:p>
      <text:p text:style-name="Preformatted_20_Text"/>
      <text:p text:style-name="Preformatted_20_Text"><text:s text:c="2"/>* `StateVec` (std::vector&lt;Complex&gt;):</text:p>
      <text:p text:style-name="Preformatted_20_Text"><text:s text:c="4"/>A dynamic array holding complex values. In this architecture, it is </text:p>
      <text:p text:style-name="Preformatted_20_Text"><text:s text:c="4"/>initialized with a size of 4 to represent a complete 2-particle state </text:p>
      <text:p text:style-name="Preformatted_20_Text"><text:s text:c="4"/>space system (four possible index configurations: 00, 01, 10, 11).</text:p>
      <text:p text:style-name="Preformatted_20_Text"/>
      <text:p text:style-name="Preformatted_20_Text"><text:s text:c="2"/>* `DeltaVec` (std::array&lt;double, 6&gt;):</text:p>
      <text:p text:style-name="Preformatted_20_Text"><text:s text:c="4"/>A fixed-size array holding exactly 6 high-precision floating-point </text:p>
      <text:p text:style-name="Preformatted_20_Text"><text:s text:c="4"/>numbers representing a 6-dimensional coordinate or metrics vector.</text:p>
      <text:p text:style-name="Preformatted_20_Text"><text:s text:c="4"/>Because it uses `std::array`, this data is kept completely on the </text:p>
      <text:p text:style-name="Preformatted_20_Text"><text:s text:c="4"/>CPU's execution stack instead of the heap, bypassing expensive memory </text:p>
      <text:p text:style-name="Preformatted_20_Text"><text:s text:c="4"/>allocation overhead and ensuring rapid data access.</text:p>
      <text:p text:style-name="Preformatted_20_Text"/>
      <text:p text:style-name="Preformatted_20_Text">------------------------------------------------------------------------</text:p>
      <text:p text:style-name="Preformatted_20_Text">3. DETAILED CODE STEPS &amp; STEP-BY-STEP WORKFLOW</text:p>
      <text:p text:style-name="Preformatted_20_Text">------------------------------------------------------------------------</text:p>
      <text:p text:style-name="Preformatted_20_Text"/>
      <text:p text:style-name="Preformatted_20_Text">CLINICAL STEP 1: INITIALIZE THE LINKED PAIR (`prepare_pair`)</text:p>
      <text:p text:style-name="Preformatted_20_Text">-------------------------------------------------------------</text:p>
      <text:p text:style-name="Preformatted_20_Text">What it does: </text:p>
      <text:p text:style-name="Preformatted_20_Text"><text:s text:c="2"/>Resets and prepares the 4-dimensional state vector to act as a clean slate </text:p>
      <text:p text:style-name="Preformatted_20_Text"><text:s text:c="2"/>for the communication/processing bridge.</text:p>
      <text:p text:style-name="Preformatted_20_Text"/>
      <text:p text:style-name="Preformatted_20_Text">How it does it:</text:p>
      <text:p text:style-name="Preformatted_20_Text"><text:s text:c="2"/>1. Calls `pair_state.assign(4, Complex(0.0, 0.0))`, which immediately wipes out </text:p>
      <text:p text:style-name="Preformatted_20_Text"><text:s text:c="5"/>any old data and allocates exactly 4 vector slots initialized to zero.</text:p>
      <text:p text:style-name="Preformatted_20_Text"><text:s text:c="2"/>2. Sets index `[0]` and index `[3]` to a value of 1 divided by the square </text:p>
      <text:p text:style-name="Preformatted_20_Text"><text:s text:c="5"/>root of 2 (approx. 0.7071). </text:p>
      <text:p text:style-name="Preformatted_20_Text"><text:s text:c="2"/>3. This specific value is mathematically critical. By placing equal values </text:p>
      <text:p text:style-name="Preformatted_20_Text"><text:soft-page-break/><text:s text:c="5"/>at the two boundaries (`[0]` and `[3]`) and leaving the middle spaces zero, </text:p>
      <text:p text:style-name="Preformatted_20_Text"><text:s text:c="5"/>the code constructs a perfectly balanced, maximally entangled system </text:p>
      <text:p text:style-name="Preformatted_20_Text"><text:s text:c="5"/>representation. It ensures that the primary side and the secondary side </text:p>
      <text:p text:style-name="Preformatted_20_Text"><text:s text:c="5"/>are completely synchronized before any load balance calculations begin.</text:p>
      <text:p text:style-name="Preformatted_20_Text"/>
      <text:p text:style-name="Preformatted_20_Text"/>
      <text:p text:style-name="Preformatted_20_Text">CLINICAL STEP 2: OFFLOAD LOAD FROM SIDE A TO SIDE B (`compute_non_local`)</text:p>
      <text:p text:style-name="Preformatted_20_Text">--------------------------------------------------------------------------</text:p>
      <text:p text:style-name="Preformatted_20_Text">What it does: </text:p>
      <text:p text:style-name="Preformatted_20_Text"><text:s text:c="2"/>Safely transfers a massive calculation/metric load from one tracking variable </text:p>
      <text:p text:style-name="Preformatted_20_Text"><text:s text:c="2"/>to its designated non-local operational partner.</text:p>
      <text:p text:style-name="Preformatted_20_Text"/>
      <text:p text:style-name="Preformatted_20_Text">How it does it:</text:p>
      <text:p text:style-name="Preformatted_20_Text"><text:s text:c="2"/>1. Instantiates a `std::lock_guard&lt;std::mutex&gt; lock(mtx_);`. This is a vital </text:p>
      <text:p text:style-name="Preformatted_20_Text"><text:s text:c="5"/>concurrency protection mechanism. If multiple separate processes or CPU </text:p>
      <text:p text:style-name="Preformatted_20_Text"><text:s text:c="5"/>threads try to pass through this bridge at the exact same millisecond, </text:p>
      <text:p text:style-name="Preformatted_20_Text"><text:s text:c="5"/>the mutex forces them into an orderly queue, preventing data corruption </text:p>
      <text:p text:style-name="Preformatted_20_Text"><text:s text:c="5"/>or race conditions.</text:p>
      <text:p text:style-name="Preformatted_20_Text"><text:s text:c="2"/>2. Copies the raw input metrics (`delta_in`) directly into the output (`delta_out`).</text:p>
      <text:p text:style-name="Preformatted_20_Text"><text:s text:c="2"/>3. Performs a mathematical reduction: It targets index `[4]` of the metrics array, </text:p>
      <text:p text:style-name="Preformatted_20_Text"><text:s text:c="5"/>takes 80% of its entire value (`delta_in[4] * 0.8`), and subtracts it. </text:p>
      <text:p text:style-name="Preformatted_20_Text"><text:s text:c="2"/>4. Simultaneously, it targets index `[3]` of the metrics array and adds that </text:p>
      <text:p text:style-name="Preformatted_20_Text"><text:s text:c="5"/>exact same 80% chunk to it.</text:p>
      <text:p text:style-name="Preformatted_20_Text"><text:s text:c="2"/>5. The result: 80% of the pressure/load is completely offset from the primary </text:p>
      <text:p text:style-name="Preformatted_20_Text"><text:s text:c="5"/>channel and cleanly absorbed by the virtual processing channel, preserving </text:p>
      <text:p text:style-name="Preformatted_20_Text"><text:s text:c="5"/>the absolute total energy/value of the closed system.</text:p>
      <text:p text:style-name="Preformatted_20_Text"/>
      <text:p text:style-name="Preformatted_20_Text"/>
      <text:p text:style-name="Preformatted_20_Text">CLINICAL STEP 3: VERIFY INTEGRITY VIA PARTIAL TRACE (`partial_trace_b`)</text:p>
      <text:p text:style-name="Preformatted_20_Text">------------------------------------------------------------------------</text:p>
      <text:p text:style-name="Preformatted_20_Text">What it does: </text:p>
      <text:p text:style-name="Preformatted_20_Text"><text:s text:c="2"/>Sifts through the 4-dimensional system state to mathematically "trace out" </text:p>
      <text:p text:style-name="Preformatted_20_Text"><text:s text:c="2"/>the secondary side, returning a reduced 2-dimensional status view of the </text:p>
      <text:p text:style-name="Preformatted_20_Text"><text:s text:c="2"/>local side's computational health.</text:p>
      <text:p text:style-name="Preformatted_20_Text"/>
      <text:p text:style-name="Preformatted_20_Text">How it does it:</text:p>
      <text:p text:style-name="Preformatted_20_Text"><text:s text:c="2"/>1. Allocates a new 2-element vector initialized to zero.</text:p>
      <text:p text:style-name="Preformatted_20_Text"><text:s text:c="2"/>2. Employs `std::norm` on the elements of the main state vector. In C++, </text:p>
      <text:p text:style-name="Preformatted_20_Text"><text:s text:c="5"/>`std::norm(z)` does not just calculate an absolute value; it outputs </text:p>
      <text:p text:style-name="Preformatted_20_Text"><text:s text:c="5"/>the squared magnitude ($|z|^2$) directly. This is an intentional optimization: </text:p>
      <text:p text:style-name="Preformatted_20_Text"><text:s text:c="5"/>it allows the software to compute probability densities instantly without </text:p>
      <text:p text:style-name="Preformatted_20_Text"><text:s text:c="5"/>forcing the CPU to run an expensive square-root instruction.</text:p>
      <text:p text:style-name="Preformatted_20_Text"><text:s text:c="2"/>3. It aggregates the combined system densities: index `[0]` plus `[1]` forms </text:p>
      <text:p text:style-name="Preformatted_20_Text"><text:s text:c="5"/>the local zero-state probability, while index `[2]` plus `[3]` forms the </text:p>
      <text:p text:style-name="Preformatted_20_Text"><text:s text:c="5"/>local one-state probability. This collapses the complex 4D structural matrix </text:p>
      <text:p text:style-name="Preformatted_20_Text"><text:s text:c="5"/>down to a highly readable, local 2D telemetry vector.</text:p>
      <text:p text:style-name="Preformatted_20_Text"/>
      <text:p text:style-name="Preformatted_20_Text"/>
      <text:p text:style-name="Preformatted_20_Text">CLINICAL STEP 4: SYSTEM HEALTH CHECK (`check_coherence`)</text:p>
      <text:p text:style-name="Preformatted_20_Text">---------------------------------------------------------</text:p>
      <text:p text:style-name="Preformatted_20_Text">What it does: </text:p>
      <text:p text:style-name="Preformatted_20_Text"><text:s text:c="2"/>Acts as an automated safety cutoff switch. It evaluates the data produced </text:p>
      <text:p text:style-name="Preformatted_20_Text"><text:s text:c="2"/>by Step 3 and determines if the execution loop is safe and stable.</text:p>
      <text:p text:style-name="Preformatted_20_Text"/>
      <text:p text:style-name="Preformatted_20_Text">How it does it:</text:p>
      <text:p text:style-name="Preformatted_20_Text"><text:s text:c="2"/>1. Extracts the real numbers from the reduced 2D tracking state and adds </text:p>
      <text:p text:style-name="Preformatted_20_Text"><text:s text:c="5"/>them together (`reduced_state[0].real() + reduced_state[1].real()`) to </text:p>
      <text:p text:style-name="Preformatted_20_Text"><text:s text:c="5"/>verify the total probability accumulation.</text:p>
      <text:p text:style-name="Preformatted_20_Text"><text:s text:c="2"/>2. Compares this sum against the user-configured `coherence_threshold` </text:p>
      <text:p text:style-name="Preformatted_20_Text"><text:s text:c="5"/>(which defaults to 0.95, or 95% structural integrity).</text:p>
      <text:p text:style-name="Preformatted_20_Text"><text:soft-page-break/><text:s text:c="2"/>3. Returns `true` if the system stability is equal to or greater than the </text:p>
      <text:p text:style-name="Preformatted_20_Text"><text:s text:c="5"/>threshold, signaling that the load-shift was safe. Returns `false` if </text:p>
      <text:p text:style-name="Preformatted_20_Text"><text:s text:c="5"/>the coherence has decayed, indicating that the data link is unstable </text:p>
      <text:p text:style-name="Preformatted_20_Text"><text:s text:c="5"/>and operations should be halted or recalibrated.</text:p>
      <text:p text:style-name="Preformatted_20_Text"/>
      <text:p text:style-name="Preformatted_20_Text">------------------------------------------------------------------------</text:p>
      <text:p text:style-name="Preformatted_20_Text">4. ADVANCED OPTIMIZATION KEYNOTES</text:p>
      <text:p text:style-name="Preformatted_20_Text">------------------------------------------------------------------------</text:p>
      <text:p text:style-name="Preformatted_20_Text"><text:s text:c="2"/>* Thread Safety: The `mutable` keyword applied to the `std::mutex` in the </text:p>
      <text:p text:style-name="Preformatted_20_Text"><text:s text:c="4"/>header configuration allows the engine to lock and unlock threads even </text:p>
      <text:p text:style-name="Preformatted_20_Text"><text:s text:c="4"/>when executing methods marked as `const`. This keeps the data safe without </text:p>
      <text:p text:style-name="Preformatted_20_Text"><text:s text:c="4"/>restricting compiler optimizations.</text:p>
      <text:p text:style-name="Preformatted_20_Text"><text:s text:c="2"/>* Constant Reference Buffers: Methods like `partial_trace_b` pass vectors using </text:p>
      <text:p text:style-name="Preformatted_20_Text"><text:s text:c="4"/>`const StateVec&amp;`. This forces the system to pass variables via memory pointers </text:p>
      <text:p text:style-name="Preformatted_20_Text"><text:s text:c="4"/>rather than duplicating the data arrays in memory, dramatically saving CPU cycles </text:p>
      <text:p text:style-name="Preformatted_20_Text"><text:s text:c="4"/>during heavy execution.</text:p>
      <text:p text:style-name="P1">========================================================================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7T19:55:29.705379799</meta:creation-date>
    <dc:date>2026-05-17T19:56:23.562656721</dc:date>
    <meta:editing-duration>PT54S</meta:editing-duration>
    <meta:editing-cycles>1</meta:editing-cycles>
    <meta:document-statistic meta:table-count="0" meta:image-count="0" meta:object-count="0" meta:page-count="3" meta:paragraph-count="121" meta:word-count="940" meta:character-count="7571" meta:non-whitespace-character-count="6414"/>
    <meta:generator>LibreOffice/25.8.6.2$Linux_X86_64 LibreOffice_project/a46b460d1686bb49c718d2ef5f88b83ff2dc4981</meta:generator>
  </office:meta>
</office:document-meta>
</file>